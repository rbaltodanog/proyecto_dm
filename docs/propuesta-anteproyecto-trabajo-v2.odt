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925cm"/>
    </style:style>
    <style:style style:name="Tabla1.B" style:family="table-column">
      <style:table-column-properties style:column-width="4.828cm"/>
    </style:style>
    <style:style style:name="Tabla1.C" style:family="table-column">
      <style:table-column-properties style:column-width="9.248cm"/>
    </style:style>
    <style:style style:name="Tabla1.A1" style:family="table-cell">
      <style:table-cell-properties style:vertical-align="middle" fo:background-color="#dddddd" fo:padding-left="0.318cm" fo:padding-right="0.318cm" fo:padding-top="0.212cm" fo:padding-bottom="0.212cm" fo:border-left="0.05pt solid #c4c7c5" fo:border-right="none" fo:border-top="0.05pt solid #c4c7c5" fo:border-bottom="0.05pt solid #c4c7c5">
        <style:background-image/>
      </style:table-cell-properties>
    </style:style>
    <style:style style:name="Tabla1.C1" style:family="table-cell">
      <style:table-cell-properties style:vertical-align="middle" fo:background-color="#dddddd" fo:padding-left="0.318cm" fo:padding-right="0.318cm" fo:padding-top="0.212cm" fo:padding-bottom="0.212cm" fo:border="0.05pt solid #c4c7c5">
        <style:background-image/>
      </style:table-cell-properties>
    </style:style>
    <style:style style:name="Tabla1.A2" style:family="table-cell">
      <style:table-cell-properties style:vertical-align="middle" fo:padding-left="0.318cm" fo:padding-right="0.318cm" fo:padding-top="0.212cm" fo:padding-bottom="0.212cm" fo:border="0.05pt solid #c4c7c5"/>
    </style:style>
    <style:style style:name="Tabla1.B2" style:family="table-cell">
      <style:table-cell-properties style:vertical-align="middle" fo:padding-left="0.318cm" fo:padding-right="0.318cm" fo:padding-top="0.212cm" fo:padding-bottom="0.212cm" fo:border="0.05pt solid #c4c7c5"/>
    </style:style>
    <style:style style:name="Tabla1.C2" style:family="table-cell">
      <style:table-cell-properties style:vertical-align="middle" fo:padding-left="0.318cm" fo:padding-right="0.318cm" fo:padding-top="0.212cm" fo:padding-bottom="0.212cm" fo:border="0.05pt solid #c4c7c5"/>
    </style:style>
    <style:style style:name="Tabla1.A3" style:family="table-cell">
      <style:table-cell-properties style:vertical-align="middle" fo:padding-left="0.318cm" fo:padding-right="0.318cm" fo:padding-top="0.212cm" fo:padding-bottom="0.212cm" fo:border="0.05pt solid #c4c7c5"/>
    </style:style>
    <style:style style:name="Tabla1.B3" style:family="table-cell">
      <style:table-cell-properties style:vertical-align="middle" fo:padding-left="0.318cm" fo:padding-right="0.318cm" fo:padding-top="0.212cm" fo:padding-bottom="0.212cm" fo:border="0.05pt solid #c4c7c5"/>
    </style:style>
    <style:style style:name="Tabla1.C3" style:family="table-cell">
      <style:table-cell-properties style:vertical-align="middle" fo:padding-left="0.318cm" fo:padding-right="0.318cm" fo:padding-top="0.212cm" fo:padding-bottom="0.212cm" fo:border="0.05pt solid #c4c7c5"/>
    </style:style>
    <style:style style:name="Tabla1.A4" style:family="table-cell">
      <style:table-cell-properties style:vertical-align="middle" fo:padding-left="0.318cm" fo:padding-right="0.318cm" fo:padding-top="0.212cm" fo:padding-bottom="0.212cm" fo:border="0.05pt solid #c4c7c5"/>
    </style:style>
    <style:style style:name="Tabla1.B4" style:family="table-cell">
      <style:table-cell-properties style:vertical-align="middle" fo:padding-left="0.318cm" fo:padding-right="0.318cm" fo:padding-top="0.212cm" fo:padding-bottom="0.212cm" fo:border="0.05pt solid #c4c7c5"/>
    </style:style>
    <style:style style:name="Tabla1.C4" style:family="table-cell">
      <style:table-cell-properties style:vertical-align="middle" fo:padding-left="0.318cm" fo:padding-right="0.318cm" fo:padding-top="0.212cm" fo:padding-bottom="0.212cm" fo:border="0.05pt solid #c4c7c5"/>
    </style:style>
    <style:style style:name="Tabla1.A5" style:family="table-cell">
      <style:table-cell-properties style:vertical-align="middle" fo:padding-left="0.318cm" fo:padding-right="0.318cm" fo:padding-top="0.212cm" fo:padding-bottom="0.212cm" fo:border="0.05pt solid #c4c7c5"/>
    </style:style>
    <style:style style:name="Tabla1.B5" style:family="table-cell">
      <style:table-cell-properties style:vertical-align="middle" fo:padding-left="0.318cm" fo:padding-right="0.318cm" fo:padding-top="0.212cm" fo:padding-bottom="0.212cm" fo:border="0.05pt solid #c4c7c5"/>
    </style:style>
    <style:style style:name="Tabla1.C5" style:family="table-cell">
      <style:table-cell-properties style:vertical-align="middle" fo:padding-left="0.318cm" fo:padding-right="0.318cm" fo:padding-top="0.212cm" fo:padding-bottom="0.212cm" fo:border="0.05pt solid #c4c7c5"/>
    </style:style>
    <style:style style:name="Tabla1.A6" style:family="table-cell">
      <style:table-cell-properties style:vertical-align="middle" fo:padding-left="0.318cm" fo:padding-right="0.318cm" fo:padding-top="0.212cm" fo:padding-bottom="0.212cm" fo:border="0.05pt solid #c4c7c5"/>
    </style:style>
    <style:style style:name="Tabla1.B6" style:family="table-cell">
      <style:table-cell-properties style:vertical-align="middle" fo:padding-left="0.318cm" fo:padding-right="0.318cm" fo:padding-top="0.212cm" fo:padding-bottom="0.212cm" fo:border="0.05pt solid #c4c7c5"/>
    </style:style>
    <style:style style:name="Tabla1.C6" style:family="table-cell">
      <style:table-cell-properties style:vertical-align="middle" fo:padding-left="0.318cm" fo:padding-right="0.318cm" fo:padding-top="0.212cm" fo:padding-bottom="0.212cm" fo:border="0.05pt solid #c4c7c5"/>
    </style:style>
    <style:style style:name="Tabla1.A7" style:family="table-cell">
      <style:table-cell-properties style:vertical-align="middle" fo:padding-left="0.318cm" fo:padding-right="0.318cm" fo:padding-top="0.212cm" fo:padding-bottom="0.212cm" fo:border="0.05pt solid #c4c7c5"/>
    </style:style>
    <style:style style:name="Tabla1.B7" style:family="table-cell">
      <style:table-cell-properties style:vertical-align="middle" fo:padding-left="0.318cm" fo:padding-right="0.318cm" fo:padding-top="0.212cm" fo:padding-bottom="0.212cm" fo:border="0.05pt solid #c4c7c5"/>
    </style:style>
    <style:style style:name="Tabla1.C7" style:family="table-cell">
      <style:table-cell-properties style:vertical-align="middle" fo:padding-left="0.318cm" fo:padding-right="0.318cm" fo:padding-top="0.212cm" fo:padding-bottom="0.212cm" fo:border="0.05pt solid #c4c7c5"/>
    </style:style>
    <style:style style:name="Tabla1.A8" style:family="table-cell">
      <style:table-cell-properties style:vertical-align="middle" fo:padding-left="0.318cm" fo:padding-right="0.318cm" fo:padding-top="0.212cm" fo:padding-bottom="0.212cm" fo:border="0.05pt solid #c4c7c5"/>
    </style:style>
    <style:style style:name="Tabla1.B8" style:family="table-cell">
      <style:table-cell-properties style:vertical-align="middle" fo:padding-left="0.318cm" fo:padding-right="0.318cm" fo:padding-top="0.212cm" fo:padding-bottom="0.212cm" fo:border="0.05pt solid #c4c7c5"/>
    </style:style>
    <style:style style:name="Tabla1.C8" style:family="table-cell">
      <style:table-cell-properties style:vertical-align="middle" fo:padding-left="0.318cm" fo:padding-right="0.318cm" fo:padding-top="0.212cm" fo:padding-bottom="0.212cm" fo:border="0.05pt solid #c4c7c5"/>
    </style:style>
    <style:style style:name="Tabla1.A9" style:family="table-cell">
      <style:table-cell-properties style:vertical-align="middle" fo:padding-left="0.318cm" fo:padding-right="0.318cm" fo:padding-top="0.212cm" fo:padding-bottom="0.212cm" fo:border="0.05pt solid #c4c7c5"/>
    </style:style>
    <style:style style:name="Tabla1.B9" style:family="table-cell">
      <style:table-cell-properties style:vertical-align="middle" fo:padding-left="0.318cm" fo:padding-right="0.318cm" fo:padding-top="0.212cm" fo:padding-bottom="0.212cm" fo:border="0.05pt solid #c4c7c5"/>
    </style:style>
    <style:style style:name="Tabla1.C9" style:family="table-cell">
      <style:table-cell-properties style:vertical-align="middle" fo:padding-left="0.318cm" fo:padding-right="0.318cm" fo:padding-top="0.212cm" fo:padding-bottom="0.212cm" fo:border="0.05pt solid #c4c7c5"/>
    </style:style>
    <style:style style:name="P1"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2" style:family="paragraph" style:parent-style-name="Table_20_Contents">
      <loext:graphic-properties draw:fill="none"/>
      <style:paragraph-properties fo:margin-left="0.101cm" fo:margin-right="0cm" fo:margin-top="0cm" fo:margin-bottom="0.247cm" style:contextual-spacing="false" fo:line-height="114%" fo:orphans="0" fo:widows="0" fo:text-indent="0cm" style:auto-text-indent="false" fo:background-color="transparent" text:number-lines="false" text:line-number="0"/>
      <style:text-properties style:font-name="Google Sans Text"/>
    </style:style>
    <style:style style:name="P3" style:family="paragraph" style:parent-style-name="Table_20_Contents">
      <loext:graphic-properties draw:fill="none"/>
      <style:paragraph-properties fo:margin-left="-0.199cm" fo:margin-right="0cm" fo:margin-top="0cm" fo:margin-bottom="0cm" style:contextual-spacing="false" fo:line-height="114%" fo:text-align="center" style:justify-single-word="false" fo:orphans="0" fo:widows="0" fo:text-indent="0cm" style:auto-text-indent="false" fo:background-color="transparent" text:number-lines="false" text:line-number="0"/>
    </style:style>
    <style:style style:name="P4" style:family="paragraph" style:parent-style-name="Table_20_Contents">
      <loext:graphic-properties draw:fill="none"/>
      <style:paragraph-properties fo:margin-left="0.101cm" fo:margin-right="0cm" fo:margin-top="0cm" fo:margin-bottom="0cm" style:contextual-spacing="false" fo:line-height="114%" fo:text-align="center" style:justify-single-word="false" fo:orphans="0" fo:widows="0" fo:text-indent="0cm" style:auto-text-indent="false" fo:background-color="transparent" text:number-lines="false" text:line-number="0"/>
    </style:style>
    <style:style style:name="P5" style:family="paragraph" style:parent-style-name="Table_20_Contents">
      <loext:graphic-properties draw:fill="none"/>
      <style:paragraph-properties fo:margin-left="-0.199cm" fo:margin-right="0cm" fo:margin-top="0cm" fo:margin-bottom="0.247cm" style:contextual-spacing="false" fo:line-height="114%" fo:orphans="0" fo:widows="0" fo:text-indent="0cm" style:auto-text-indent="false" fo:background-color="transparent" text:number-lines="false" text:line-number="0"/>
    </style:style>
    <style:style style:name="P6" style:family="paragraph" style:parent-style-name="Table_20_Contents">
      <loext:graphic-properties draw:fill="none"/>
      <style:paragraph-properties fo:margin-left="0.101cm" fo:margin-right="0cm" fo:margin-top="0cm" fo:margin-bottom="0.247cm" style:contextual-spacing="false" fo:line-height="114%" fo:orphans="0" fo:widows="0" fo:text-indent="0cm" style:auto-text-indent="false" fo:background-color="transparent" text:number-lines="false" text:line-number="0"/>
    </style:style>
    <style:style style:name="P7" style:family="paragraph" style:parent-style-name="Heading_20_2">
      <style:paragraph-properties fo:margin-left="0cm" fo:margin-right="0cm" fo:margin-top="0cm" fo:margin-bottom="0.247cm" style:contextual-spacing="false" fo:line-height="114%" fo:text-indent="0cm" style:auto-text-indent="false"/>
    </style:style>
    <style:style style:name="P8" style:family="paragraph" style:parent-style-name="Heading_20_3">
      <style:paragraph-properties fo:margin-left="0cm" fo:margin-right="0cm" fo:margin-top="0cm" fo:margin-bottom="0.247cm" style:contextual-spacing="false" fo:line-height="114%" fo:text-indent="0cm" style:auto-text-indent="false"/>
    </style:style>
    <style:style style:name="P9" style:family="paragraph" style:parent-style-name="Text_20_body">
      <style:paragraph-properties fo:margin-left="0cm" fo:margin-right="0cm" fo:margin-top="0cm" fo:margin-bottom="0.247cm" style:contextual-spacing="false" fo:line-height="114%" fo:text-indent="0cm" style:auto-text-indent="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Standard">
      <style:paragraph-properties fo:break-before="page"/>
    </style:style>
    <style:style style:name="P14" style:family="paragraph" style:parent-style-name="Heading_20_1">
      <style:text-properties style:font-name="Liberation Sans" fo:font-size="12pt" style:font-size-asian="12pt" style:font-size-complex="12pt"/>
    </style:style>
    <style:style style:name="P15" style:family="paragraph" style:parent-style-name="Heading_20_2">
      <style:text-properties style:font-name="Liberation Sans" fo:font-size="12pt" style:font-size-asian="12pt" style:font-size-complex="12pt"/>
    </style:style>
    <style:style style:name="P16" style:family="paragraph" style:parent-style-name="Text_20_body">
      <style:paragraph-properties fo:margin-left="0cm" fo:margin-right="0cm" fo:margin-top="0cm" fo:margin-bottom="0.247cm" style:contextual-spacing="false" fo:line-height="114%" fo:text-indent="0cm" style:auto-text-indent="false"/>
      <style:text-properties style:font-name="Liberation Sans" fo:font-size="12pt" style:font-size-asian="12pt" style:font-size-complex="12pt"/>
    </style:style>
    <style:style style:name="P17" style:family="paragraph" style:parent-style-name="Text_20_body">
      <style:paragraph-properties fo:margin-left="0cm" fo:margin-right="0cm" fo:margin-top="0cm" fo:margin-bottom="0.247cm" style:contextual-spacing="false" fo:line-height="114%" fo:text-indent="0cm" style:auto-text-indent="false"/>
      <style:text-properties style:font-name="Liberation Sans" fo:font-size="12pt" officeooo:rsid="0006f5b5" officeooo:paragraph-rsid="0006f5b5" style:font-size-asian="12pt" style:font-size-complex="12pt"/>
    </style:style>
    <style:style style:name="P18" style:family="paragraph" style:parent-style-name="Standard">
      <style:paragraph-properties fo:text-align="center" style:justify-single-word="false"/>
      <style:text-properties style:font-name="Liberation Sans" fo:font-size="20pt" style:font-size-asian="20pt" style:font-size-complex="20pt"/>
    </style:style>
    <style:style style:name="P19" style:family="paragraph" style:parent-style-name="Standard">
      <style:paragraph-properties fo:text-align="center" style:justify-single-word="false"/>
      <style:text-properties style:font-name="Liberation Sans" fo:font-size="20pt" officeooo:paragraph-rsid="0006f5b5" style:font-size-asian="20pt" style:font-size-complex="20pt"/>
    </style:style>
    <style:style style:name="P20" style:family="paragraph" style:parent-style-name="Standard">
      <style:paragraph-properties fo:text-align="center" style:justify-single-word="false"/>
      <style:text-properties style:font-name="Liberation Sans" fo:font-size="20pt" officeooo:rsid="0006f5b5" officeooo:paragraph-rsid="0006f5b5" style:font-size-asian="20pt" style:font-size-complex="20pt"/>
    </style:style>
    <style:style style:name="P21" style:family="paragraph" style:parent-style-name="Standard">
      <style:paragraph-properties fo:text-align="center" style:justify-single-word="false"/>
      <style:text-properties officeooo:rsid="0006f5b5" officeooo:paragraph-rsid="0006f5b5"/>
    </style:style>
    <style:style style:name="P22" style:family="paragraph" style:parent-style-name="Standard">
      <style:paragraph-properties fo:text-align="center" style:justify-single-word="false"/>
      <style:text-properties officeooo:rsid="0008dc23" officeooo:paragraph-rsid="0008dc23"/>
    </style:style>
    <style:style style:name="P23" style:family="paragraph" style:parent-style-name="Quotations">
      <style:text-properties fo:font-weight="bold"/>
    </style:style>
    <style:style style:name="P24" style:family="paragraph" style:parent-style-name="Text_20_body">
      <style:paragraph-properties fo:margin-left="0cm" fo:margin-right="0cm" fo:margin-top="0cm" fo:margin-bottom="0.247cm" style:contextual-spacing="false" fo:line-height="114%" fo:text-indent="0cm" style:auto-text-indent="false"/>
      <style:text-properties officeooo:rsid="000d1a86" officeooo:paragraph-rsid="000d1a86"/>
    </style:style>
    <style:style style:name="P25" style:family="paragraph" style:parent-style-name="Heading_20_3">
      <style:paragraph-properties fo:margin-left="0cm" fo:margin-right="0cm" fo:margin-top="0cm" fo:margin-bottom="0.212cm" style:contextual-spacing="false" fo:line-height="114%" fo:text-indent="0cm" style:auto-text-indent="false"/>
    </style:style>
    <style:style style:name="P26"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27" style:family="paragraph" style:parent-style-name="Heading_20_3">
      <style:paragraph-properties fo:margin-left="0cm" fo:margin-right="0cm" fo:margin-top="0cm" fo:margin-bottom="0.247cm" style:contextual-spacing="false" fo:line-height="114%" fo:text-indent="0cm" style:auto-text-indent="false"/>
      <style:text-properties officeooo:rsid="000dd855" officeooo:paragraph-rsid="000dd855"/>
    </style:style>
    <style:style style:name="P28" style:family="paragraph" style:parent-style-name="Text_20_body" style:list-style-name="L1">
      <style:paragraph-properties fo:margin-top="0cm" fo:margin-bottom="0.247cm" style:contextual-spacing="false" fo:line-height="114%"/>
      <style:text-properties style:font-name="Liberation Sans" fo:font-size="12pt" officeooo:rsid="0006f5b5" officeooo:paragraph-rsid="0006f5b5" style:font-size-asian="12pt" style:font-size-complex="12pt"/>
    </style:style>
    <style:style style:name="P29"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Liberation Sans" fo:font-size="12pt" officeooo:paragraph-rsid="0006f5b5" style:font-size-asian="12pt" style:font-size-complex="12pt"/>
    </style:style>
    <style:style style:name="P30"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3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Liberation Sans" fo:font-size="12pt" style:font-size-asian="12pt" style:font-size-complex="12pt"/>
    </style:style>
    <style:style style:name="P32"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Liberation Sans" fo:font-size="12pt" fo:font-weight="normal" style:font-size-asian="12pt" style:font-weight-asian="normal" style:font-size-complex="12pt" style:font-weight-complex="normal"/>
    </style:style>
    <style:style style:name="P33"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3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35" style:family="paragraph" style:parent-style-name="Text_20_body">
      <style:paragraph-properties fo:margin-left="0cm" fo:margin-right="0cm" fo:margin-top="0cm" fo:margin-bottom="0.247cm" style:contextual-spacing="false" fo:line-height="114%" fo:text-indent="0cm" style:auto-text-indent="false"/>
    </style:style>
    <style:style style:name="P36"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style>
    <style:style style:name="P37"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style>
    <style:style style:name="P38"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style>
    <style:style style:name="P39" style:family="paragraph" style:parent-style-name="Text_20_body">
      <style:paragraph-properties fo:margin-left="0cm" fo:margin-right="0cm" fo:margin-top="0cm" fo:margin-bottom="0.247cm" style:contextual-spacing="false" fo:line-height="114%" fo:text-indent="0cm" style:auto-text-indent="false"/>
      <style:text-properties officeooo:paragraph-rsid="000dd855"/>
    </style:style>
    <style:style style:name="P40" style:family="paragraph" style:parent-style-name="Text_20_body" style:list-style-name="L5"/>
    <style:style style:name="P41" style:family="paragraph" style:parent-style-name="Text_20_body" style:list-style-name="L5">
      <style:text-properties fo:font-weight="bold"/>
    </style:style>
    <style:style style:name="P42" style:family="paragraph" style:parent-style-name="Text_20_body" style:list-style-name="L6">
      <style:text-properties fo:font-weight="bold"/>
    </style:style>
    <style:style style:name="P43" style:family="paragraph" style:parent-style-name="Text_20_body" style:list-style-name="L7">
      <style:text-properties fo:font-weight="bold"/>
    </style:style>
    <style:style style:name="P44" style:family="paragraph" style:parent-style-name="Text_20_body" style:list-style-name="L8">
      <style:text-properties fo:font-weight="bold"/>
    </style:style>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paragraph-properties fo:margin-left="0cm" fo:margin-right="0cm" fo:margin-top="0cm" fo:margin-bottom="0.247cm" style:contextual-spacing="false" fo:line-height="114%" fo:text-indent="0cm" style:auto-text-indent="false"/>
      <style:text-properties officeooo:rsid="000dd855" officeooo:paragraph-rsid="000dd855"/>
    </style:style>
    <style:style style:name="P5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4" style:family="paragraph" style:parent-style-name="Text_20_body" style:list-style-name="L16"/>
    <style:style style:name="T1" style:family="text">
      <style:text-properties style:font-name="Google Sans Text"/>
    </style:style>
    <style:style style:name="T2" style:family="text">
      <style:text-properties style:font-name="Google Sans Text" fo:font-weight="bold"/>
    </style:style>
    <style:style style:name="T3" style:family="text">
      <style:text-properties style:font-name="Google Sans Text" officeooo:rsid="0006f5b5"/>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officeooo:rsid="0006f5b5"/>
    </style:style>
    <style:style style:name="T7" style:family="text">
      <style:text-properties fo:font-style="italic"/>
    </style:style>
    <style:style style:name="T8" style:family="text">
      <style:text-properties officeooo:rsid="0006f5b5"/>
    </style:style>
    <style:style style:name="T9" style:family="text">
      <style:text-properties style:font-name="Liberation Sans" fo:font-size="12pt" fo:font-weight="bold" style:font-size-asian="12pt" style:font-size-complex="12pt"/>
    </style:style>
    <style:style style:name="T10" style:family="text">
      <style:text-properties style:font-name="Liberation Sans" fo:font-size="12pt" fo:font-weight="bold" officeooo:rsid="0006f5b5" style:font-size-asian="12pt" style:font-size-complex="12pt"/>
    </style:style>
    <style:style style:name="T11" style:family="text">
      <style:text-properties style:font-name="Liberation Sans" fo:font-size="12pt" style:font-size-asian="12pt" style:font-size-complex="12pt"/>
    </style:style>
    <style:style style:name="T12" style:family="text">
      <style:text-properties style:font-name="Liberation Sans" fo:font-size="12pt" fo:font-weight="normal" style:font-size-asian="12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officeooo:rsid="0008dc23"/>
    </style:style>
    <style:style style:name="T15" style:family="text">
      <style:text-properties officeooo:rsid="0009c001"/>
    </style:style>
    <style:style style:name="T16" style:family="text">
      <style:text-properties officeooo:rsid="000dd855"/>
    </style:style>
    <style:style style:name="T17" style:family="text">
      <style:text-properties style:font-name="Google Sans"/>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0">Instituto Tecnológico de Costa Rica.</text:p>
      <text:p text:style-name="P18"/>
      <text:p text:style-name="P18"/>
      <text:p text:style-name="P18"/>
      <text:p text:style-name="P20">Programa de Ciencia de Datos. </text:p>
      <text:p text:style-name="P20"/>
      <text:p text:style-name="P20"/>
      <text:p text:style-name="P20"/>
      <text:p text:style-name="P20">Módulo V</text:p>
      <text:p text:style-name="P18"/>
      <text:p text:style-name="P18"/>
      <text:p text:style-name="P18"><text:s/>Anteproyecto</text:p>
      <text:p text:style-name="P19">Inteligencia de Negocios para</text:p>
      <text:p text:style-name="P19"><text:s/>Chinook Digital Media Store</text:p>
      <text:p text:style-name="Standard"/>
      <text:p text:style-name="Standard"/>
      <text:p text:style-name="Standard"/>
      <text:p text:style-name="P21">Estudiantes: </text:p>
      <text:p text:style-name="P21"/>
      <text:p text:style-name="P21">Roberto Baltodano <text:span text:style-name="T14">García</text:span></text:p>
      <text:p text:style-name="P21">Sergio Blanzo Zeledón </text:p>
      <text:p text:style-name="Standard"/>
      <text:p text:style-name="Standard"/>
      <text:p text:style-name="Standard"/>
      <text:p text:style-name="Standard"/>
      <text:p text:style-name="Standard"/>
      <text:p text:style-name="Standard"/>
      <text:p text:style-name="P22">mayo 2026</text:p>
      <text:table-of-content text:style-name="Sect1" text:protected="true"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rotected="true">
            <text:p text:style-name="P12">Tabla de Contenido</text:p>
          </text:index-title>
          <text:p text:style-name="P10"><text:a xlink:type="simple" xlink:href="#__RefHeading___Toc17402_2271349370" text:style-name="Index_20_Link" text:visited-style-name="Index_20_Link">1. Fase de Entendimiento del Negocio<text:tab/>3</text:a></text:p>
          <text:p text:style-name="P11"><text:a xlink:type="simple" xlink:href="#__RefHeading___Toc17404_2271349370" text:style-name="Index_20_Link" text:visited-style-name="Index_20_Link">Objetivos y criterios de éxito<text:tab/>3</text:a></text:p>
          <text:p text:style-name="P10"><text:a xlink:type="simple" xlink:href="#__RefHeading___Toc17406_2271349370" text:style-name="Index_20_Link" text:visited-style-name="Index_20_Link">2. Sistemas de información<text:tab/>3</text:a></text:p>
          <text:p text:style-name="P10"><text:a xlink:type="simple" xlink:href="#__RefHeading___Toc17408_2271349370" text:style-name="Index_20_Link" text:visited-style-name="Index_20_Link">3. Requerimientos de información<text:tab/>4</text:a></text:p>
          <text:p text:style-name="P10"><text:a xlink:type="simple" xlink:href="#__RefHeading___Toc17410_2271349370" text:style-name="Index_20_Link" text:visited-style-name="Index_20_Link">4. Descripción de la base de datos (justificación de tablas y campos)<text:tab/>4</text:a></text:p>
        </text:index-body>
      </text:table-of-content>
      <text:p text:style-name="Standard"/>
      <text:p text:style-name="P13"/>
      <text:h text:style-name="P14" text:outline-level="1"><text:bookmark-start text:name="__RefHeading___Toc17402_2271349370"/>1. Fase de Entendimiento del Negocio<text:bookmark-end text:name="__RefHeading___Toc17402_2271349370"/></text:h>
      <text:p text:style-name="P16"><text:bookmark text:name="p-rc_8aff956259a0e9c7-50"/>En esta fase se establece el marco estratégico y comercial que guiará el desarrollo de la solución analítica. </text:p>
      <text:p text:style-name="P16"><text:span text:style-name="T15">Para el acceso a la informacion de Chinook Digital Media Store se debe de acceder al siguiente enlace: <text:s/></text:span><text:a xlink:type="simple" xlink:href="https://github.com/lerocha/chinook-database" text:style-name="Internet_20_link" text:visited-style-name="Visited_20_Internet_20_Link">https://github.com/lerocha/chinook-database</text:a></text:p>
      <text:h text:style-name="P15" text:outline-level="2"><text:bookmark-start text:name="__RefHeading___Toc17404_2271349370"/>Objetivos <text:span text:style-name="T8">y c</text:span>riterios de éxito<text:bookmark-end text:name="__RefHeading___Toc17404_2271349370"/></text:h>
      <text:p text:style-name="P17">Objetivo general: </text:p>
      <text:list text:style-name="L1">
        <text:list-item>
          <text:p text:style-name="P28">Desarrollar una solución analítica multidimensional basada en un almacén de datos (Data Warehouse) bajo la metodología CRISP-DM para la base de datos transaccional de Chinook Digital Media Store, con el fin de proporcionar herramientas de Inteligencia de Negocios que optimicen la rotación del catálogo musical e identifiquen segmentos de clientes de alto valor estratégico.</text:p>
        </text:list-item>
      </text:list>
      <text:p text:style-name="P17">Objetivos específicos: </text:p>
      <text:list text:style-name="L2">
        <text:list-item>
          <text:p text:style-name="P29"><text:span text:style-name="T5">Objetivo de </text:span><text:span text:style-name="T6">n</text:span><text:span text:style-name="T5">egocio </text:span><text:span text:style-name="T6">1</text:span><text:span text:style-name="T5">: </text:span>Optimizar el catálogo de medios digitales mediante la identificación y reducción de productos con baja rotación de inventario virtual (pistas musicales y álbumes sin ventas). </text:p>
          <text:list>
            <text:list-item>
              <text:p text:style-name="P30"><text:span text:style-name="T5">Criterio de éxito 1.1:</text:span> Lograr clasificar el 100% del catálogo musical actual en categorías de rendimiento comercial (Alto, Medio, Crítico/Sin Ventas) basándose en el histórico de los últimos 4 años.</text:p>
            </text:list-item>
            <text:list-item>
              <text:p text:style-name="P30"><text:span text:style-name="T5">Criterio de éxito 1.2:</text:span> Proveer al departamento de adquisiciones un listado automatizado de los 50 artistas y géneros menos rentables para congelar compras de nuevas licencias o renegociar contratos de distribución, buscando reducir costes de almacenamiento o licenciamiento inactivo en al menos un <text:span text:style-name="T5">15%</text:span>.</text:p>
            </text:list-item>
          </text:list>
        </text:list-item>
        <text:list-item>
          <text:p text:style-name="P30"><text:span text:style-name="T5">Objetivo de </text:span><text:span text:style-name="T6">n</text:span><text:span text:style-name="T5">egocio 2:</text:span> Maximizar los ingresos por ventas recurrentes a través de la retención y fidelización de clientes de alto valor (estrategia de clientes <text:span text:style-name="T7">VIP</text:span>).</text:p>
          <text:list>
            <text:list-item>
              <text:p text:style-name="P30"><text:span text:style-name="T5">Criterio de éxito 2.1:</text:span> Diseñar un modelo de segmentación que identifique de forma precisa al <text:span text:style-name="T5">top 10%</text:span> de los clientes que generan el mayor volumen de facturación acumulada por región geográfica.</text:p>
            </text:list-item>
            <text:list-item>
              <text:p text:style-name="P30"><text:span text:style-name="T5">Criterio de éxito 2.2:</text:span> Generar la base de datos de clientes objetivo para que el equipo de marketing digital despliegue campañas de promociones personalizadas (por ejemplo, cupones para sus géneros musicales preferidos), apuntando a un incremento de un <text:span text:style-name="T5">5%</text:span> en el ticket promedio de compra en el siguiente trimestre.</text:p>
            </text:list-item>
          </text:list>
        </text:list-item>
      </text:list>
      <text:h text:style-name="P14" text:outline-level="1"><text:bookmark-start text:name="__RefHeading___Toc17406_2271349370"/>2. Sistemas de <text:span text:style-name="T8">i</text:span>nformación<text:bookmark-end text:name="__RefHeading___Toc17406_2271349370"/></text:h>
      <text:p text:style-name="P16"><text:bookmark text:name="p-rc_8aff956259a0e9c7-53"/>Esta sección detalla el origen de los datos y el ecosistema transaccional actual del cual se nutrirá nuestra solución. </text:p>
      <text:list text:style-name="L3">
        <text:list-item>
          <text:p text:style-name="P33"><text:soft-page-break/><text:span text:style-name="T9">Nombre de la </text:span><text:span text:style-name="T10">b</text:span><text:span text:style-name="T9">ase de </text:span><text:span text:style-name="T10">d</text:span><text:span text:style-name="T9">atos:</text:span><text:span text:style-name="T11"> </text:span><text:span text:style-name="Source_20_Text"><text:span text:style-name="T11">Chinook</text:span></text:span><text:span text:style-name="T11"> (disponible y compatible nativamente en motores relacionales como SQL Server, Oracle, MySQL, PostgreSQL, SQLite y DB2).</text:span></text:p>
        </text:list-item>
        <text:list-item>
          <text:p text:style-name="P31"><text:span text:style-name="T5">Tema o </text:span><text:span text:style-name="T6">n</text:span><text:span text:style-name="T5">aturaleza de los </text:span><text:span text:style-name="T6">d</text:span><text:span text:style-name="T5">atos:</text:span> Se trata de un sistema transaccional (OLTP) que administra las operaciones de una tienda de música digital. Maneja flujos de información que vinculan catálogos multimedia (canciones, álbumes, artistas, géneros), estructuras corporativas (empleados y asignación de soporte a clientes) y el registro detallado de las transacciones de venta internacionales (facturas y líneas de detalle) con clientes localizables geográficamente.</text:p>
        </text:list-item>
      </text:list>
      <text:h text:style-name="P14" text:outline-level="1"><text:bookmark-start text:name="__RefHeading___Toc17408_2271349370"/>3. Requerimientos de <text:span text:style-name="T8">i</text:span>nformación<text:bookmark-end text:name="__RefHeading___Toc17408_2271349370"/></text:h>
      <text:p text:style-name="P16"><text:bookmark text:name="p-rc_8aff956259a0e9c7-54"/>Para dar soporte a los objetivos de negocio planteados, el almacén de datos (Data Warehouse) deberá ser capaz de resolver y responder de manera ágil los siguientes interrogantes analíticos: <text:span text:style-name="T13"/></text:p>
      <text:list text:style-name="L4">
        <text:list-item>
          <text:p text:style-name="P34"><text:bookmark text:name="p-rc_8aff956259a0e9c7-55"/><text:span text:style-name="T12">¿Cuáles son las pistas musicales (</text:span><text:span text:style-name="Source_20_Text"><text:span text:style-name="T12">Tracks</text:span></text:span><text:span text:style-name="T12">) y álbumes que no han registrado ninguna venta a lo largo de todo el histórico disponible, y a qué artistas y géneros pertenecen? (Orientado al Objetivo de Negocio 1). </text:span></text:p>
        </text:list-item>
        <text:list-item>
          <text:p text:style-name="P32"><text:bookmark text:name="p-rc_8aff956259a0e9c7-56"/>¿Qué géneros musicales específicos han sufrido una desaceleración o disminución sostenida en sus ventas globales durante el último semestre de registros? (Orientado al Objetivo de Negocio 1). </text:p>
        </text:list-item>
        <text:list-item>
          <text:p text:style-name="P32"><text:bookmark text:name="p-rc_8aff956259a0e9c7-57"/>¿De qué países, estados y ciudades provienen los clientes que han incrementado consecutivamente su volumen de compra año tras año? (Orientado al Objetivo de Negocio 2). </text:p>
        </text:list-item>
        <text:list-item>
          <text:p text:style-name="P34"><text:span text:style-name="T12">¿Quiénes son los clientes específicos que componen el grupo de mayor valor (mayor facturación acumulada) y qué empleados de soporte (</text:span><text:span text:style-name="Source_20_Text"><text:span text:style-name="T12">Employees</text:span></text:span><text:span text:style-name="T12">) están a cargo de su atención directa? (Orientado al Objetivo de Negocio 2).</text:span></text:p>
        </text:list-item>
      </text:list>
      <text:h text:style-name="P14" text:outline-level="1"><text:bookmark-start text:name="__RefHeading___Toc17410_2271349370"/>4. Descripción de la <text:span text:style-name="T8">b</text:span>ase de <text:span text:style-name="T8">d</text:span>atos (<text:span text:style-name="T8">j</text:span>ustificación de <text:span text:style-name="T8">t</text:span>ablas y <text:span text:style-name="T8">c</text:span>ampos)<text:bookmark-end text:name="__RefHeading___Toc17410_2271349370"/></text:h>
      <text:p text:style-name="P1"><text:bookmark text:name="p-rc_8aff956259a0e9c7-58"/>Para dar solución estricta a los requerimientos de información planteados en el punto anterior, se seleccionarán y justificarán las siguientes tablas del ecosistema de Chinook: </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3"><text:span text:style-name="Strong_20_Emphasis"><text:span text:style-name="T1">Tabla</text:span></text:span></text:p>
            </table:table-cell>
            <table:table-cell table:style-name="Tabla1.A1" office:value-type="string">
              <text:p text:style-name="P4"><text:span text:style-name="Strong_20_Emphasis"><text:span text:style-name="T1">Campos </text:span></text:span><text:span text:style-name="Strong_20_Emphasis"><text:span text:style-name="T3">c</text:span></text:span><text:span text:style-name="Strong_20_Emphasis"><text:span text:style-name="T1">lave </text:span></text:span><text:span text:style-name="Strong_20_Emphasis"><text:span text:style-name="T3">s</text:span></text:span><text:span text:style-name="Strong_20_Emphasis"><text:span text:style-name="T1">eleccionados</text:span></text:span></text:p>
            </table:table-cell>
            <table:table-cell table:style-name="Tabla1.C1" office:value-type="string">
              <text:p text:style-name="P4"><text:span text:style-name="Strong_20_Emphasis"><text:span text:style-name="T1">Justificación de </text:span></text:span><text:span text:style-name="Strong_20_Emphasis"><text:span text:style-name="T3">u</text:span></text:span><text:span text:style-name="Strong_20_Emphasis"><text:span text:style-name="T1">so </text:span></text:span></text:p>
            </table:table-cell>
          </table:table-row>
        </table:table-header-rows>
        <table:table-row>
          <table:table-cell table:style-name="Tabla1.A2" office:value-type="string">
            <text:p text:style-name="P5"><text:span text:style-name="Source_20_Text"><text:span text:style-name="T2">Track</text:span></text:span></text:p>
          </table:table-cell>
          <table:table-cell table:style-name="Tabla1.B2" office:value-type="string">
            <text:p text:style-name="P6"><text:span text:style-name="Source_20_Text"><text:span text:style-name="T1">TrackId</text:span></text:span><text:span text:style-name="T1">, </text:span><text:span text:style-name="Source_20_Text"><text:span text:style-name="T1">Name</text:span></text:span><text:span text:style-name="T1">, </text:span><text:span text:style-name="Source_20_Text"><text:span text:style-name="T1">AlbumId</text:span></text:span><text:span text:style-name="T1">, </text:span><text:span text:style-name="Source_20_Text"><text:span text:style-name="T1">GenreId</text:span></text:span><text:span text:style-name="T1">, </text:span><text:span text:style-name="Source_20_Text"><text:span text:style-name="T1">UnitPrice</text:span></text:span></text:p>
          </table:table-cell>
          <table:table-cell table:style-name="Tabla1.C2" office:value-type="string">
            <text:p text:style-name="P2">Es el núcleo del catálogo musical. Permite cruzar e identificar cuáles canciones específicas se están vendiendo y cuáles tienen nula rotación.</text:p>
          </table:table-cell>
        </table:table-row>
        <table:table-row>
          <table:table-cell table:style-name="Tabla1.A2" office:value-type="string">
            <text:p text:style-name="P5"><text:span text:style-name="Source_20_Text"><text:span text:style-name="T2">Album</text:span></text:span></text:p>
          </table:table-cell>
          <table:table-cell table:style-name="Tabla1.B2" office:value-type="string">
            <text:p text:style-name="P6"><text:span text:style-name="Source_20_Text"><text:span text:style-name="T1">AlbumId</text:span></text:span><text:span text:style-name="T1">, </text:span><text:span text:style-name="Source_20_Text"><text:span text:style-name="T1">Title</text:span></text:span><text:span text:style-name="T1">, </text:span><text:soft-page-break/><text:span text:style-name="Source_20_Text"><text:span text:style-name="T1">ArtistId</text:span></text:span></text:p>
          </table:table-cell>
          <table:table-cell table:style-name="Tabla1.C2" office:value-type="string">
            <text:p text:style-name="P2">Permite agrupar las canciones por <text:soft-page-break/>producción discográfica para evaluar si existen álbumes completos sin rendimiento comercial.</text:p>
          </table:table-cell>
        </table:table-row>
        <table:table-row>
          <table:table-cell table:style-name="Tabla1.A2" office:value-type="string">
            <text:p text:style-name="P5"><text:span text:style-name="Source_20_Text"><text:span text:style-name="T2">Artist</text:span></text:span></text:p>
          </table:table-cell>
          <table:table-cell table:style-name="Tabla1.B2" office:value-type="string">
            <text:p text:style-name="P6"><text:span text:style-name="Source_20_Text"><text:span text:style-name="T1">ArtistId</text:span></text:span><text:span text:style-name="T1">, </text:span><text:span text:style-name="Source_20_Text"><text:span text:style-name="T1">Name</text:span></text:span></text:p>
          </table:table-cell>
          <table:table-cell table:style-name="Tabla1.C2" office:value-type="string">
            <text:p text:style-name="P2">Esencial para identificar y listar a los creadores o bandas de la música sin ventas para la toma de decisiones contractuales.</text:p>
          </table:table-cell>
        </table:table-row>
        <table:table-row>
          <table:table-cell table:style-name="Tabla1.A2" office:value-type="string">
            <text:p text:style-name="P5"><text:span text:style-name="Source_20_Text"><text:span text:style-name="T2">Genre</text:span></text:span></text:p>
          </table:table-cell>
          <table:table-cell table:style-name="Tabla1.B2" office:value-type="string">
            <text:p text:style-name="P6"><text:span text:style-name="Source_20_Text"><text:span text:style-name="T1">GenreId</text:span></text:span><text:span text:style-name="T1">, </text:span><text:span text:style-name="Source_20_Text"><text:span text:style-name="T1">Name</text:span></text:span></text:p>
          </table:table-cell>
          <table:table-cell table:style-name="Tabla1.C2" office:value-type="string">
            <text:p text:style-name="P2">Permite categorizar el comportamiento de las ventas y detectar macro-tendencias (cuáles géneros musicales están en declive o crecimiento).</text:p>
          </table:table-cell>
        </table:table-row>
        <table:table-row>
          <table:table-cell table:style-name="Tabla1.A2" office:value-type="string">
            <text:p text:style-name="P5"><text:span text:style-name="Source_20_Text"><text:span text:style-name="T2">Invoice</text:span></text:span></text:p>
          </table:table-cell>
          <table:table-cell table:style-name="Tabla1.B2" office:value-type="string">
            <text:p text:style-name="P6"><text:span text:style-name="Source_20_Text"><text:span text:style-name="T1">InvoiceId</text:span></text:span><text:span text:style-name="T1">, </text:span><text:span text:style-name="Source_20_Text"><text:span text:style-name="T1">CustomerId</text:span></text:span><text:span text:style-name="T1">, </text:span><text:span text:style-name="Source_20_Text"><text:span text:style-name="T1">InvoiceDate</text:span></text:span><text:span text:style-name="T1">, </text:span><text:span text:style-name="Source_20_Text"><text:span text:style-name="T1">BillingCountry</text:span></text:span><text:span text:style-name="T1">, </text:span><text:span text:style-name="Source_20_Text"><text:span text:style-name="T1">BillingState</text:span></text:span><text:span text:style-name="T1">, </text:span><text:span text:style-name="Source_20_Text"><text:span text:style-name="T1">BillingCity</text:span></text:span><text:span text:style-name="T1">, </text:span><text:span text:style-name="Source_20_Text"><text:span text:style-name="T1">Total</text:span></text:span></text:p>
          </table:table-cell>
          <table:table-cell table:style-name="Tabla1.C2" office:value-type="string">
            <text:p text:style-name="P2">Contiene la metadata transaccional básica de tiempo y geografía. Es indispensable para calcular la facturación total y analizar el comportamiento de las ventas por país/estado a lo largo del tiempo.</text:p>
          </table:table-cell>
        </table:table-row>
        <table:table-row>
          <table:table-cell table:style-name="Tabla1.A2" office:value-type="string">
            <text:p text:style-name="P5"><text:span text:style-name="Source_20_Text"><text:span text:style-name="T2">InvoiceLine</text:span></text:span></text:p>
          </table:table-cell>
          <table:table-cell table:style-name="Tabla1.B2" office:value-type="string">
            <text:p text:style-name="P6"><text:span text:style-name="Source_20_Text"><text:span text:style-name="T1">InvoiceLineId</text:span></text:span><text:span text:style-name="T1">, </text:span><text:span text:style-name="Source_20_Text"><text:span text:style-name="T1">InvoiceId</text:span></text:span><text:span text:style-name="T1">, </text:span><text:span text:style-name="Source_20_Text"><text:span text:style-name="T1">TrackId</text:span></text:span><text:span text:style-name="T1">, </text:span><text:span text:style-name="Source_20_Text"><text:span text:style-name="T1">Quantity</text:span></text:span><text:span text:style-name="T1">, </text:span><text:span text:style-name="Source_20_Text"><text:span text:style-name="T1">UnitPrice</text:span></text:span></text:p>
          </table:table-cell>
          <table:table-cell table:style-name="Tabla1.C2" office:value-type="string">
            <text:p text:style-name="P2">Detalle granular de las compras. Permite verificar la cantidad de unidades vendidas de cada pista individual y validar matemáticamente la ausencia de registros de los productos sin rotación.</text:p>
          </table:table-cell>
        </table:table-row>
        <table:table-row>
          <table:table-cell table:style-name="Tabla1.A2" office:value-type="string">
            <text:p text:style-name="P5"><text:span text:style-name="Source_20_Text"><text:span text:style-name="T2">Customer</text:span></text:span></text:p>
          </table:table-cell>
          <table:table-cell table:style-name="Tabla1.B2" office:value-type="string">
            <text:p text:style-name="P6"><text:span text:style-name="Source_20_Text"><text:span text:style-name="T1">CustomerId</text:span></text:span><text:span text:style-name="T1">, </text:span><text:span text:style-name="Source_20_Text"><text:span text:style-name="T1">FirstName</text:span></text:span><text:span text:style-name="T1">, </text:span><text:span text:style-name="Source_20_Text"><text:span text:style-name="T1">LastName</text:span></text:span><text:span text:style-name="T1">, </text:span><text:span text:style-name="Source_20_Text"><text:span text:style-name="T1">Country</text:span></text:span><text:span text:style-name="T1">, </text:span><text:span text:style-name="Source_20_Text"><text:span text:style-name="T1">State</text:span></text:span><text:span text:style-name="T1">, </text:span><text:span text:style-name="Source_20_Text"><text:span text:style-name="T1">City</text:span></text:span><text:span text:style-name="T1">, </text:span><text:span text:style-name="Source_20_Text"><text:span text:style-name="T1">SupportRepId</text:span></text:span></text:p>
          </table:table-cell>
          <table:table-cell table:style-name="Tabla1.C2" office:value-type="string">
            <text:p text:style-name="P2">Almacena los perfiles de los compradores. Crucial para la segmentación de clientes VIP y el análisis de la distribución geográfica del incremento de ventas.</text:p>
          </table:table-cell>
        </table:table-row>
        <table:table-row>
          <table:table-cell table:style-name="Tabla1.A9" office:value-type="string">
            <text:p text:style-name="P5"><text:span text:style-name="Source_20_Text"><text:span text:style-name="T2">Employee</text:span></text:span></text:p>
          </table:table-cell>
          <table:table-cell table:style-name="Tabla1.B9" office:value-type="string">
            <text:p text:style-name="P6"><text:span text:style-name="Source_20_Text"><text:span text:style-name="T1">EmployeeId</text:span></text:span><text:span text:style-name="T1">, </text:span><text:span text:style-name="Source_20_Text"><text:span text:style-name="T1">FirstName</text:span></text:span><text:span text:style-name="T1">, </text:span><text:soft-page-break/><text:span text:style-name="Source_20_Text"><text:span text:style-name="T1">LastName</text:span></text:span><text:span text:style-name="T1">, </text:span><text:span text:style-name="Source_20_Text"><text:span text:style-name="T1">Title</text:span></text:span></text:p>
          </table:table-cell>
          <table:table-cell table:style-name="Tabla1.C9" office:value-type="string">
            <text:p text:style-name="P2">Permite mapear al personal interno involucrado en la atención y retención de <text:soft-page-break/>los clientes que generan el mayor valor al negocio.</text:p>
          </table:table-cell>
        </table:table-row>
      </table:table>
      <text:h text:style-name="P7" text:outline-level="2"/>
      <text:p text:style-name="P9"/>
      <text:h text:style-name="P8" text:outline-level="3">Requerimiento 1</text:h>
      <text:p text:style-name="Quotations"><text:span text:style-name="T5">¿Cuáles son las pistas musicales (</text:span><text:span text:style-name="Source_20_Text"><text:span text:style-name="T5">Tracks</text:span></text:span><text:span text:style-name="T5">) y álbumes que no han registrado ninguna venta a lo largo de todo el histórico disponible, y a qué artistas y géneros pertenecen?</text:span></text:p>
      <text:list text:style-name="L5">
        <text:list-item>
          <text:p text:style-name="P41">Tablas Principales Requeridas:</text:p>
          <text:list>
            <text:list-item>
              <text:p text:style-name="P40"><text:span text:style-name="Source_20_Text"><text:span text:style-name="T5">Track</text:span></text:span>: Contiene la lista total de canciones licenciadas por la tienda digital. Es la tabla base sobre la cual se debe realizar una exclusión lógica (e.g., <text:span text:style-name="Source_20_Text">LEFT JOIN</text:span> o <text:span text:style-name="Source_20_Text">NOT IN</text:span>) para verificar qué identificadores (<text:span text:style-name="Source_20_Text">TrackId</text:span>) no figuran en las transacciones comerciales.</text:p>
            </text:list-item>
            <text:list-item>
              <text:p text:style-name="P40"><text:span text:style-name="Source_20_Text"><text:span text:style-name="T5">InvoiceLine</text:span></text:span>: Almacena el detalle granular de los artículos vendidos. Es la tabla obligatoria para comprobar la ausencia de registros de compra de las canciones inactivas.</text:p>
            </text:list-item>
          </text:list>
        </text:list-item>
        <text:list-item>
          <text:p text:style-name="P41">Tablas Secundarias (Estructurales de Dimensión):</text:p>
          <text:list>
            <text:list-item>
              <text:p text:style-name="P40"><text:span text:style-name="Source_20_Text"><text:span text:style-name="T5">Album</text:span></text:span>: Requerida para agrupar e identificar las producciones completas que no generan rendimiento comercial.</text:p>
            </text:list-item>
            <text:list-item>
              <text:p text:style-name="P40"><text:span text:style-name="Source_20_Text"><text:span text:style-name="T5">Artist</text:span></text:span>: Necesaria para asociar el nombre del creador o banda con el álbum y la pista sin ventas.</text:p>
            </text:list-item>
            <text:list-item>
              <text:p text:style-name="P40"><text:span text:style-name="Source_20_Text"><text:span text:style-name="T5">Genre</text:span></text:span>: Indispensable para categorizar las pistas huérfanas de venta según su género musical.</text:p>
            </text:list-item>
          </text:list>
        </text:list-item>
      </text:list>
      <text:h text:style-name="Heading_20_3" text:outline-level="3">Requerimiento 2</text:h>
      <text:p text:style-name="P23">¿Qué géneros musicales específicos han sufrido una desaceleración o disminución sostenida en sus ventas globales durante el último semestre de registros?</text:p>
      <text:list text:style-name="L6">
        <text:list-item>
          <text:p text:style-name="P42">Tablas Principales Requeridas:</text:p>
          <text:list>
            <text:list-item>
              <text:p text:style-name="P45"><text:span text:style-name="Source_20_Text"><text:span text:style-name="T5">Invoice</text:span></text:span>: Proporciona el encabezado de la facturación con el atributo temporal clave (<text:span text:style-name="Source_20_Text">InvoiceDate</text:span>). Es indispensable para poder filtrar las transacciones por semestres y años históricos, permitiendo calcular la desaceleración del negocio.</text:p>
            </text:list-item>
            <text:list-item>
              <text:p text:style-name="P45"><text:span text:style-name="Source_20_Text"><text:span text:style-name="T5">InvoiceLine</text:span></text:span>: Contiene los montos unitarios (<text:span text:style-name="Source_20_Text">UnitPrice</text:span>) y las cantidades transaccionadas (<text:span text:style-name="Source_20_Text">Quantity</text:span>) para calcular el volumen total de ingresos.</text:p>
            </text:list-item>
            <text:list-item>
              <text:p text:style-name="P45"><text:soft-page-break/><text:span text:style-name="Source_20_Text"><text:span text:style-name="T5">Genre</text:span></text:span>: Contiene el nombre del género musical (<text:span text:style-name="Source_20_Text">Name</text:span>). Al unirse con el detalle de venta, permite consolidar y comparar los ingresos agregados de cada categoría musical a lo largo del tiempo.</text:p>
            </text:list-item>
          </text:list>
        </text:list-item>
        <text:list-item>
          <text:p text:style-name="P42">Tablas Secundarias:</text:p>
          <text:list>
            <text:list-item>
              <text:p text:style-name="P45"><text:span text:style-name="Source_20_Text"><text:span text:style-name="T5">Track</text:span></text:span>: Actúa únicamente como puente relacional intermedio para conectar la línea de detalle de la venta (<text:span text:style-name="Source_20_Text">InvoiceLine</text:span>) con su respectivo género (<text:span text:style-name="Source_20_Text">Genre</text:span>).</text:p>
            </text:list-item>
          </text:list>
        </text:list-item>
      </text:list>
      <text:h text:style-name="Heading_20_3" text:outline-level="3">Requerimiento 3</text:h>
      <text:p text:style-name="P23">¿De qué países, estados y ciudades provienen los clientes que han incrementado consecutivamente su volumen de compra año tras año?</text:p>
      <text:list text:style-name="L7">
        <text:list-item>
          <text:p text:style-name="P43">Tablas Principales Requeridas:</text:p>
          <text:list>
            <text:list-item>
              <text:p text:style-name="P46"><text:span text:style-name="Source_20_Text"><text:span text:style-name="T5">Invoice</text:span></text:span>: Registra tanto los montos de facturación (<text:span text:style-name="Source_20_Text">Total</text:span>) como la fecha de emisión (<text:span text:style-name="Source_20_Text">InvoiceDate</text:span>) para realizar agrupaciones por periodos anuales. Además, almacena los campos geográficos de destino del envío (<text:span text:style-name="Source_20_Text">BillingCountry</text:span>, <text:span text:style-name="Source_20_Text">BillingState</text:span>, <text:span text:style-name="Source_20_Text">BillingCity</text:span>).</text:p>
            </text:list-item>
            <text:list-item>
              <text:p text:style-name="P46"><text:span text:style-name="Source_20_Text"><text:span text:style-name="T5">Customer</text:span></text:span>: Contiene los perfiles de los compradores. Aunque la tabla <text:span text:style-name="Source_20_Text">Invoice</text:span> posee datos geográficos de facturación, la tabla de clientes es crucial para validar y estructurar la dimensión demográfica base del comprador (<text:span text:style-name="Source_20_Text">Country</text:span>, <text:span text:style-name="Source_20_Text">State</text:span>, <text:span text:style-name="Source_20_Text">City</text:span>) y agrupar el comportamiento recurrente a nivel de entidad.</text:p>
            </text:list-item>
          </text:list>
        </text:list-item>
      </text:list>
      <text:h text:style-name="Heading_20_3" text:outline-level="3">Requerimiento 4</text:h>
      <text:p text:style-name="Quotations"><text:span text:style-name="T5">¿Quiénes son los clientes específicos que componen el grupo de mayor valor (mayor facturación acumulada) y qué empleados de soporte (</text:span><text:span text:style-name="Source_20_Text"><text:span text:style-name="T5">Employees</text:span></text:span><text:span text:style-name="T5">) están a cargo de su atención directa?</text:span></text:p>
      <text:list text:style-name="L8">
        <text:list-item>
          <text:p text:style-name="P44">Tablas Principales Requeridas:</text:p>
          <text:list>
            <text:list-item>
              <text:p text:style-name="P47"><text:span text:style-name="Source_20_Text"><text:span text:style-name="T5">Customer</text:span></text:span>: Aporta la identidad directa de los compradores (<text:span text:style-name="Source_20_Text">FirstName</text:span>, <text:span text:style-name="Source_20_Text">LastName</text:span>) para listar formalmente el top de la cartera de clientes de alto valor. Posee la llave foránea (<text:span text:style-name="Source_20_Text">SupportRepId</text:span>) que la conecta con su gestor corporativo.</text:p>
            </text:list-item>
            <text:list-item>
              <text:p text:style-name="P47"><text:span text:style-name="Source_20_Text"><text:span text:style-name="T5">Invoice</text:span></text:span>: Contiene el campo de valor total (<text:span text:style-name="Source_20_Text">Total</text:span>) por cada compra individual, el cual debe ser procesado mediante una función de agregación (<text:span text:style-name="Source_20_Text">SUM</text:span>) para calcular el gasto acumulado histórico por cliente.</text:p>
            </text:list-item>
            <text:list-item>
              <text:p text:style-name="P47"><text:span text:style-name="Source_20_Text"><text:span text:style-name="T5">Employee</text:span></text:span>: Almacena los registros del personal interno (<text:span text:style-name="Source_20_Text">FirstName</text:span>, <text:span text:style-name="Source_20_Text">LastName</text:span>, <text:span text:style-name="Source_20_Text">Title</text:span>). Es la tabla requerida para identificar con nombre y apellido a los representantes de soporte que atienden de forma directa al segmento de clientes VIP.</text:p>
            </text:list-item>
          </text:list>
        </text:list-item>
      </text:list>
      <text:h text:style-name="Heading_20_3" text:outline-level="3">Resumen para el Almacén de Datos</text:h>
      <text:p text:style-name="Text_20_body">Para el diseño físico de las canalizaciones <text:span text:style-name="T5">ETL</text:span> y la posterior carga de datos en un <text:span text:style-name="T5">Esquema Multidimensional</text:span>, tu proyecto necesitará extraer de manera estricta la información de <text:span text:style-name="T5">8 tablas operativas</text:span> del entorno Chinook: <text:span text:style-name="Source_20_Text">Track</text:span>, <text:span text:style-name="Source_20_Text">Album</text:span>, <text:span text:style-name="Source_20_Text">Artist</text:span>, <text:span text:style-name="Source_20_Text">Genre</text:span>, <text:span text:style-name="Source_20_Text">Invoice</text:span>, <text:span text:style-name="Source_20_Text">InvoiceLine</text:span>, <text:soft-page-break/><text:span text:style-name="Source_20_Text">Customer</text:span> y <text:span text:style-name="Source_20_Text">Employee</text:span>. Esto asegura la cobertura del 100% de los requerimientos analíticos planteados en el anteproyecto.</text:p>
      <text:p text:style-name="P9"/>
      <text:p text:style-name="P9"/>
      <text:p text:style-name="P24">ATRIBUTOS DE CADA TABLA. </text:p>
      <text:p text:style-name="P24"/>
      <text:p text:style-name="P24">Basado en la estructura física DDL de la base de datos transaccional <text:span text:style-name="T5">Chinook</text:span> y cruzándolo de manera estricta con el documento de <text:span text:style-name="T5">Propuesta de Anteproyecto</text:span>, a continuación se desglosan los atributos mínimos y necesarios (llaves primarias, foráneas y campos descriptivos o métricas) requeridos para dar solución analítica a cada requerimiento de información:</text:p>
      <text:h text:style-name="Heading_20_3" text:outline-level="3">Requerimiento de Información 1</text:h>
      <text:p text:style-name="Quotations"><text:span text:style-name="T5">¿Cuáles son las pistas musicales (</text:span><text:span text:style-name="Source_20_Text"><text:span text:style-name="T5">Tracks</text:span></text:span><text:span text:style-name="T5">) y álbumes que no han registrado ninguna venta a lo largo de todo el histórico disponible, y a qué artistas y géneros pertenecen?</text:span></text:p>
      <text:p text:style-name="Text_20_body">Para resolver la ausencia de compras mediante una consulta de exclusión (tipo <text:span text:style-name="Source_20_Text">NOT IN</text:span> o <text:span text:style-name="Source_20_Text">LEFT JOIN</text:span>), se necesitan mapear las estructuras de catálogo e interconectarlas con el detalle transaccional mediante los siguientes atributos:</text:p>
      <text:list text:style-name="L9">
        <text:list-item>
          <text:p text:style-name="P48"><text:span text:style-name="Source_20_Text"><text:span text:style-name="T5">Track</text:span></text:span>:</text:p>
          <text:list>
            <text:list-item>
              <text:p text:style-name="P48"><text:span text:style-name="Source_20_Text">TrackId</text:span> <text:span text:style-name="T7">(Llave Primaria)</text:span>: Atributo clave para verificar la existencia o ausencia del producto en la tabla de ventas.</text:p>
            </text:list-item>
            <text:list-item>
              <text:p text:style-name="P48"><text:span text:style-name="Source_20_Text">Name</text:span> <text:span text:style-name="T7">(Atributo Descriptivo)</text:span>: Nombre de la canción o pista que se va a listar.</text:p>
            </text:list-item>
            <text:list-item>
              <text:p text:style-name="P48"><text:span text:style-name="Source_20_Text">AlbumId</text:span> <text:span text:style-name="T7">(Llave Foránea)</text:span>: Permite conectar la canción con su respectivo álbum.</text:p>
            </text:list-item>
            <text:list-item>
              <text:p text:style-name="P48"><text:span text:style-name="Source_20_Text">GenreId</text:span> <text:span text:style-name="T7">(Llave Foránea)</text:span>: Permite conectar la canción con su respectiva categoría o género musical.</text:p>
            </text:list-item>
          </text:list>
        </text:list-item>
        <text:list-item>
          <text:p text:style-name="P48"><text:span text:style-name="Source_20_Text"><text:span text:style-name="T5">InvoiceLine</text:span></text:span>:</text:p>
          <text:list>
            <text:list-item>
              <text:p text:style-name="P48"><text:span text:style-name="Source_20_Text">TrackId</text:span> <text:span text:style-name="T7">(Llave Foránea)</text:span>: Atributo fundamental para constatar qué canciones <text:span text:style-name="T5">sí</text:span> han tenido transacciones comerciales.</text:p>
            </text:list-item>
          </text:list>
        </text:list-item>
        <text:list-item>
          <text:p text:style-name="P48"><text:span text:style-name="Source_20_Text"><text:span text:style-name="T5">Album</text:span></text:span>:</text:p>
          <text:list>
            <text:list-item>
              <text:p text:style-name="P48"><text:span text:style-name="Source_20_Text">AlbumId</text:span> <text:span text:style-name="T7">(Llave Primaria)</text:span>: Código identificador del disco.</text:p>
            </text:list-item>
            <text:list-item>
              <text:p text:style-name="P48"><text:span text:style-name="Source_20_Text">Title</text:span> <text:span text:style-name="T7">(Atributo Descriptivo)</text:span>: Nombre o título de la producción discográfica a reportar.</text:p>
            </text:list-item>
            <text:list-item>
              <text:p text:style-name="P48"><text:span text:style-name="Source_20_Text">ArtistId</text:span> <text:span text:style-name="T7">(Llave Foránea)</text:span>: Permite enlazar el álbum al autor o banda correspondiente.</text:p>
            </text:list-item>
          </text:list>
        </text:list-item>
        <text:list-item>
          <text:p text:style-name="P48"><text:span text:style-name="Source_20_Text"><text:span text:style-name="T5">Artist</text:span></text:span>:</text:p>
          <text:list>
            <text:list-item>
              <text:p text:style-name="P48"><text:span text:style-name="Source_20_Text">ArtistId</text:span> <text:span text:style-name="T7">(Llave Primaria)</text:span>: Código único del artista.</text:p>
            </text:list-item>
            <text:list-item>
              <text:p text:style-name="P48"><text:soft-page-break/><text:span text:style-name="Source_20_Text">Name</text:span> <text:span text:style-name="T7">(Atributo Descriptivo)</text:span>: Nombre de la banda o solista.</text:p>
            </text:list-item>
          </text:list>
        </text:list-item>
        <text:list-item>
          <text:p text:style-name="P48"><text:span text:style-name="Source_20_Text"><text:span text:style-name="T5">Genre</text:span></text:span>:</text:p>
          <text:list>
            <text:list-item>
              <text:p text:style-name="P48"><text:span text:style-name="Source_20_Text">GenreId</text:span> <text:span text:style-name="T7">(Llave Primaria)</text:span>: Código único del género.</text:p>
            </text:list-item>
            <text:list-item>
              <text:p text:style-name="P48"><text:span text:style-name="Source_20_Text">Name</text:span> <text:span text:style-name="T7">(Atributo Descriptivo)</text:span>: Nombre descriptivo de la categoría musical (ej. Rock, Jazz).</text:p>
            </text:list-item>
          </text:list>
        </text:list-item>
      </text:list>
      <text:h text:style-name="Heading_20_3" text:outline-level="3">Requerimiento de Información 2</text:h>
      <text:p text:style-name="P23">¿Qué géneros musicales específicos han sufrido una desaceleración o disminución sostenida en sus ventas globales durante el último semestre de registros?</text:p>
      <text:p text:style-name="Text_20_body">Este análisis requiere cálculos de tendencias temporales y consolidación de ingresos monetarios agregados por categoría, por lo que se necesitan los siguientes atributos:</text:p>
      <text:list text:style-name="L10">
        <text:list-item>
          <text:p text:style-name="P49"><text:span text:style-name="Source_20_Text"><text:span text:style-name="T5">Invoice</text:span></text:span>:</text:p>
          <text:list>
            <text:list-item>
              <text:p text:style-name="P49"><text:span text:style-name="Source_20_Text">InvoiceId</text:span> <text:span text:style-name="T7">(Llave Primaria)</text:span>: Conector directo con la línea de detalle.</text:p>
            </text:list-item>
            <text:list-item>
              <text:p text:style-name="P49"><text:span text:style-name="Source_20_Text">InvoiceDate</text:span> <text:span text:style-name="T7">(Atributo de Tiempo/Fecha)</text:span>: Atributo indispensable para agrupar las transacciones en semestres y años, permitiendo evaluar el comportamiento histórico y la desaceleración del negocio.</text:p>
            </text:list-item>
          </text:list>
        </text:list-item>
        <text:list-item>
          <text:p text:style-name="P49"><text:span text:style-name="Source_20_Text"><text:span text:style-name="T5">InvoiceLine</text:span></text:span>:</text:p>
          <text:list>
            <text:list-item>
              <text:p text:style-name="P49"><text:span text:style-name="Source_20_Text">InvoiceId</text:span> <text:span text:style-name="T7">(Llave Foránea)</text:span>: Relación con la cabecera de la factura.</text:p>
            </text:list-item>
            <text:list-item>
              <text:p text:style-name="P49"><text:span text:style-name="Source_20_Text">TrackId</text:span> <text:span text:style-name="T7">(Llave Foránea)</text:span>: Puente relacional para llegar a la clasificación musical.</text:p>
            </text:list-item>
            <text:list-item>
              <text:p text:style-name="P49"><text:span text:style-name="Source_20_Text">UnitPrice</text:span> <text:span text:style-name="T7">(Métrica / Valor Monetario)</text:span>: Precio unitario de la pista al momento de la venta.</text:p>
            </text:list-item>
            <text:list-item>
              <text:p text:style-name="P49"><text:span text:style-name="Source_20_Text">Quantity</text:span> <text:span text:style-name="T7">(Métrica / Volumen)</text:span>: Cantidad de unidades adquiridas (usada en conjunto con <text:span text:style-name="Source_20_Text">UnitPrice</text:span> para calcular los ingresos generados).</text:p>
            </text:list-item>
          </text:list>
        </text:list-item>
        <text:list-item>
          <text:p text:style-name="P49"><text:span text:style-name="Source_20_Text"><text:span text:style-name="T5">Track</text:span></text:span>:</text:p>
          <text:list>
            <text:list-item>
              <text:p text:style-name="P49"><text:span text:style-name="Source_20_Text">TrackId</text:span> <text:span text:style-name="T7">(Llave Primaria)</text:span>: Identificador de la pista.</text:p>
            </text:list-item>
            <text:list-item>
              <text:p text:style-name="P49"><text:span text:style-name="Source_20_Text">GenreId</text:span> <text:span text:style-name="T7">(Llave Foránea)</text:span>: Enlace final hacia el nombre de la categoría.</text:p>
            </text:list-item>
          </text:list>
        </text:list-item>
        <text:list-item>
          <text:p text:style-name="P49"><text:span text:style-name="Source_20_Text"><text:span text:style-name="T5">Genre</text:span></text:span>:</text:p>
          <text:list>
            <text:list-item>
              <text:p text:style-name="P49"><text:span text:style-name="Source_20_Text">GenreId</text:span> <text:span text:style-name="T7">(Llave Primaria)</text:span>: Identificador del género.</text:p>
            </text:list-item>
            <text:list-item>
              <text:p text:style-name="P49"><text:span text:style-name="Source_20_Text">Name</text:span> <text:span text:style-name="T7">(Atributo Descriptivo)</text:span>: Nombre del género musical sobre el cual se calculará el declive de ingresos globales.</text:p>
            </text:list-item>
          </text:list>
        </text:list-item>
      </text:list>
      <text:h text:style-name="Heading_20_3" text:outline-level="3">Requerimiento de Información 3</text:h>
      <text:p text:style-name="P23">¿De qué países, estados y ciudades provienen los clientes que han incrementado consecutivamente su volumen de compra año tras año?</text:p>
      <text:p text:style-name="Text_20_body"><text:soft-page-break/>Este interrogante requiere comparar el rendimiento total por cliente en periodos anuales segregándolos bajo agrupaciones geográficas, utilizando los siguientes campos:</text:p>
      <text:list text:style-name="L11">
        <text:list-item>
          <text:p text:style-name="P50"><text:span text:style-name="Source_20_Text"><text:span text:style-name="T5">Invoice</text:span></text:span>:</text:p>
          <text:list>
            <text:list-item>
              <text:p text:style-name="P50"><text:span text:style-name="Source_20_Text">CustomerId</text:span> <text:span text:style-name="T7">(Llave Foránea)</text:span>: Permite agrupar las transacciones recurrentes por cliente individual.</text:p>
            </text:list-item>
            <text:list-item>
              <text:p text:style-name="P50"><text:span text:style-name="Source_20_Text">InvoiceDate</text:span> <text:span text:style-name="T7">(Atributo de Tiempo)</text:span>: Permite extraer el año de la venta para evaluar el incremento o decremento consecutivo anual.</text:p>
            </text:list-item>
            <text:list-item>
              <text:p text:style-name="P50"><text:span text:style-name="Source_20_Text">Total</text:span> <text:span text:style-name="T7">(Métrica)</text:span>: Monto monetario total de la factura que sirve para sumarizar y contrastar el volumen financiero anual por comprador.</text:p>
            </text:list-item>
          </text:list>
        </text:list-item>
        <text:list-item>
          <text:p text:style-name="P50"><text:span text:style-name="Source_20_Text"><text:span text:style-name="T5">Customer</text:span></text:span>:</text:p>
          <text:list>
            <text:list-item>
              <text:p text:style-name="P50"><text:span text:style-name="Source_20_Text">CustomerId</text:span> <text:span text:style-name="T7">(Llave Primaria)</text:span>: Identificador del cliente para consolidar su perfil único.</text:p>
            </text:list-item>
            <text:list-item>
              <text:p text:style-name="P50"><text:span text:style-name="Source_20_Text">Country</text:span> <text:span text:style-name="T7">(Atributo Geográfico)</text:span>: País de procedencia del cliente.</text:p>
            </text:list-item>
            <text:list-item>
              <text:p text:style-name="P50"><text:span text:style-name="Source_20_Text">State</text:span> <text:span text:style-name="T7">(Atributo Geográfico)</text:span>: Estado o provincia de origen (esencial para jerarquías multidimensionales).</text:p>
            </text:list-item>
            <text:list-item>
              <text:p text:style-name="P50"><text:span text:style-name="Source_20_Text">City</text:span> <text:span text:style-name="T7">(Atributo Geográfico)</text:span>: Ciudad de residencia del consumidor.</text:p>
            </text:list-item>
          </text:list>
        </text:list-item>
      </text:list>
      <text:p text:style-name="Text_20_body"><text:span text:style-name="T7">(Nota: Aunque la tabla </text:span><text:span text:style-name="Source_20_Text"><text:span text:style-name="T7">Invoice</text:span></text:span><text:span text:style-name="T7"> posee campos de facturación geográfica como </text:span><text:span text:style-name="Source_20_Text"><text:span text:style-name="T7">BillingCountry</text:span></text:span><text:span text:style-name="T7">, se prioriza la tabla </text:span><text:span text:style-name="Source_20_Text"><text:span text:style-name="T7">Customer</text:span></text:span><text:span text:style-name="T7"> para asegurar que el análisis demográfico se construya con base en los perfiles maestros de la cartera activa y no en direcciones variables de envío).</text:span></text:p>
      <text:h text:style-name="Heading_20_3" text:outline-level="3">Requerimiento de Información 4</text:h>
      <text:p text:style-name="Quotations"><text:span text:style-name="T5">¿Quiénes son los clientes específicos que componen el grupo de mayor valor (mayor facturación acumulada) y qué empleados de soporte (</text:span><text:span text:style-name="Source_20_Text"><text:span text:style-name="T5">Employees</text:span></text:span><text:span text:style-name="T5">) están a cargo de su atención directa?</text:span></text:p>
      <text:p text:style-name="Text_20_body">Para este análisis de segmentación de clientes VIP y auditoría de asignación interna de soporte de ventas, los atributos requeridos son:</text:p>
      <text:list text:style-name="L12">
        <text:list-item>
          <text:p text:style-name="P51"><text:span text:style-name="Source_20_Text"><text:span text:style-name="T5">Customer</text:span></text:span>:</text:p>
          <text:list>
            <text:list-item>
              <text:p text:style-name="P51"><text:span text:style-name="Source_20_Text">CustomerId</text:span> <text:span text:style-name="T7">(Llave Primaria)</text:span>: Identificador maestro del cliente.</text:p>
            </text:list-item>
            <text:list-item>
              <text:p text:style-name="P51"><text:span text:style-name="Source_20_Text">FirstName</text:span> <text:span text:style-name="T7">(Atributo Descriptivo)</text:span>: Primer nombre del comprador.</text:p>
            </text:list-item>
            <text:list-item>
              <text:p text:style-name="P51"><text:span text:style-name="Source_20_Text">LastName</text:span> <text:span text:style-name="T7">(Atributo Descriptivo)</text:span>: Apellido del comprador.</text:p>
            </text:list-item>
            <text:list-item>
              <text:p text:style-name="P51"><text:span text:style-name="Source_20_Text">SupportRepId</text:span> <text:span text:style-name="T7">(Llave Foránea)</text:span>: Campo relacional crítico que conecta al cliente de manera jerárquica con su representante de soporte asignado.</text:p>
            </text:list-item>
          </text:list>
        </text:list-item>
        <text:list-item>
          <text:p text:style-name="P51"><text:span text:style-name="Source_20_Text"><text:span text:style-name="T5">Invoice</text:span></text:span>:</text:p>
          <text:list>
            <text:list-item>
              <text:p text:style-name="P51"><text:span text:style-name="Source_20_Text">CustomerId</text:span> <text:span text:style-name="T7">(Llave Foránea)</text:span>: Conexión para acumular los montos de compra.</text:p>
            </text:list-item>
            <text:list-item>
              <text:p text:style-name="P51"><text:soft-page-break/><text:span text:style-name="Source_20_Text">Total</text:span> <text:span text:style-name="T7">(Métrica)</text:span>: Campo numérico sobre el cual se aplicará una función de agregación (<text:span text:style-name="Source_20_Text">SUM(Total)</text:span>) para clasificar a los clientes según su valor financiero de vida.</text:p>
            </text:list-item>
          </text:list>
        </text:list-item>
        <text:list-item>
          <text:p text:style-name="P51"><text:span text:style-name="Source_20_Text"><text:span text:style-name="T5">Employee</text:span></text:span>:</text:p>
          <text:list>
            <text:list-item>
              <text:p text:style-name="P51"><text:span text:style-name="Source_20_Text">EmployeeId</text:span> <text:span text:style-name="T7">(Llave Primaria)</text:span>: Identificador único del empleado que se mapea contra el campo <text:span text:style-name="Source_20_Text">SupportRepId</text:span> de la tabla de clientes.</text:p>
            </text:list-item>
            <text:list-item>
              <text:p text:style-name="P51"><text:span text:style-name="Source_20_Text">FirstName</text:span> <text:span text:style-name="T7">(Atributo Descriptivo)</text:span>: Nombre del representante asignado a la cuenta VIP.</text:p>
            </text:list-item>
            <text:list-item>
              <text:p text:style-name="P51"><text:span text:style-name="Source_20_Text">LastName</text:span> <text:span text:style-name="T7">(Atributo Descriptivo)</text:span>: Apellido del representante analizado.</text:p>
            </text:list-item>
            <text:list-item>
              <text:p text:style-name="P51"><text:span text:style-name="Source_20_Text">Title</text:span> <text:span text:style-name="T7">(Atributo Descriptivo)</text:span>: Cargo o puesto dentro de la organización corporativa (ej. <text:span text:style-name="T7">Sales Support Agent</text:span>) para validar su rol operativo.</text:p>
            </text:list-item>
          </text:list>
        </text:list-item>
      </text:list>
      <text:p text:style-name="P24"/>
      <text:p text:style-name="P9"/>
      <text:p text:style-name="P9"/>
      <text:p text:style-name="P39"><text:span text:style-name="T16">Para la BD DW <text:s text:c="2"/>se describe los campos que se eliminan, <text:line-break/><text:line-break/><text:line-break/></text:span><text:bookmark text:name="p-rc_5e8fc662b4ae185f-88"/><text:span text:style-name="T1">Sí, al revisar en detalle el esquema de la base de datos </text:span><text:span text:style-name="Source_20_Text"><text:span text:style-name="T1">Chinook_Analisis</text:span></text:span><text:span text:style-name="T1"> provisto en el archivo </text:span><text:span text:style-name="Source_20_Text"><text:span text:style-name="T1">Script_BD_Stage-v2.txt</text:span></text:span><text:span text:style-name="T1">, se identifican varios campos específicos en las tablas que </text:span><text:span text:style-name="T2">no son necesarios</text:span><text:span text:style-name="T1"> ni se consumen en ninguna de las cuatro preguntas analíticas planteadas. </text:span></text:p>
      <text:p text:style-name="P1">A continuación, se detallan cuáles son esos campos sobrantes por cada tabla y por qué no se requieren para los objetivos de negocio:</text:p>
      <text:h text:style-name="P25" text:outline-level="3"><text:span text:style-name="T17">1. Tabla </text:span><text:span text:style-name="Source_20_Text"><text:span text:style-name="T1">Employee</text:span></text:span><text:span text:style-name="T17"> (Empleados)</text:span></text:h>
      <text:list text:style-name="L13">
        <text:list-item>
          <text:p text:style-name="P36"><text:bookmark text:name="p-rc_5e8fc662b4ae185f-89"/><text:span text:style-name="T2">Campos sobrantes:</text:span><text:span text:style-name="T1"> </text:span><text:span text:style-name="Source_20_Text"><text:span text:style-name="T1">Title</text:span></text:span><text:span text:style-name="T1"> (Cargo/Puesto). </text:span></text:p>
        </text:list-item>
        <text:list-item>
          <text:p text:style-name="P36"><text:bookmark text:name="p-rc_5e8fc662b4ae185f-90"/><text:span text:style-name="T2">Razón:</text:span><text:span text:style-name="T1"> La </text:span><text:span text:style-name="T2">Pregunta 4</text:span><text:span text:style-name="T1"> solo pide identificar qué empleados de soporte (</text:span><text:span text:style-name="Source_20_Text"><text:span text:style-name="T1">Employees</text:span></text:span><text:span text:style-name="T1">) están a cargo de la atención directa de los clientes de mayor valor. Para responder esto, solo se necesitan sus datos de identidad (</text:span><text:span text:style-name="Source_20_Text"><text:span text:style-name="T1">FirstName</text:span></text:span><text:span text:style-name="T1">, </text:span><text:span text:style-name="Source_20_Text"><text:span text:style-name="T1">LastName</text:span></text:span><text:span text:style-name="T1">) y su identificador (</text:span><text:span text:style-name="Source_20_Text"><text:span text:style-name="T1">EmployeeId</text:span></text:span><text:span text:style-name="T1">) para realizar el acoplamiento con la tabla de clientes. El cargo o título del empleado no aporta valor a dicha consulta. </text:span></text:p>
        </text:list-item>
      </text:list>
      <text:h text:style-name="P25" text:outline-level="3"><text:span text:style-name="T17">2. Tabla </text:span><text:span text:style-name="Source_20_Text"><text:span text:style-name="T1">Track</text:span></text:span><text:span text:style-name="T17"> (Pistas Musicales)</text:span></text:h>
      <text:list text:style-name="L14">
        <text:list-item>
          <text:p text:style-name="P37"><text:bookmark text:name="p-rc_5e8fc662b4ae185f-91"/><text:span text:style-name="T2">Campos sobrantes:</text:span><text:span text:style-name="T1"> </text:span><text:span text:style-name="Source_20_Text"><text:span text:style-name="T1">UnitPrice</text:span></text:span><text:span text:style-name="T1"> (Precio Unitario de la Pista). </text:span></text:p>
        </text:list-item>
        <text:list-item>
          <text:p text:style-name="P37"><text:bookmark text:name="p-rc_5e8fc662b4ae185f-92"/><text:span text:style-name="T2">Razón:</text:span><text:span text:style-name="T1"> * Para la </text:span><text:span text:style-name="T2">Pregunta 1</text:span><text:span text:style-name="T1"> (pistas sin ventas), solo se requiere verificar la existencia o ausencia del </text:span><text:span text:style-name="Source_20_Text"><text:span text:style-name="T1">TrackId</text:span></text:span><text:span text:style-name="T1"> en las transacciones. </text:span></text:p>
          <text:list>
            <text:list-item>
              <text:p text:style-name="P37"><text:bookmark text:name="p-rc_5e8fc662b4ae185f-93"/><text:soft-page-break/><text:span text:style-name="T1">Para la </text:span><text:span text:style-name="T2">Pregunta 2</text:span><text:span text:style-name="T1"> (desaceleración de géneros), el análisis financiero de los ingresos y cantidades se debe realizar directamente sobre los campos </text:span><text:span text:style-name="Source_20_Text"><text:span text:style-name="T1">UnitPrice</text:span></text:span><text:span text:style-name="T1"> y </text:span><text:span text:style-name="Source_20_Text"><text:span text:style-name="T1">Quantity</text:span></text:span><text:span text:style-name="T1"> de la tabla </text:span><text:span text:style-name="Source_20_Text"><text:span text:style-name="T2">InvoiceLine</text:span></text:span><text:span text:style-name="T1">. El precio en la tabla </text:span><text:span text:style-name="Source_20_Text"><text:span text:style-name="T1">Track</text:span></text:span><text:span text:style-name="T1"> es el valor de lista actual, pero el cálculo real de ventas históricas siempre se extrae de la línea de la factura para reflejar lo que verdaderamente pagó el usuario. </text:span></text:p>
            </text:list-item>
          </text:list>
        </text:list-item>
      </text:list>
      <text:h text:style-name="P25" text:outline-level="3"><text:span text:style-name="T17">3. Tabla </text:span><text:span text:style-name="Source_20_Text"><text:span text:style-name="T1">Invoice</text:span></text:span><text:span text:style-name="T17"> (Facturas)</text:span></text:h>
      <text:list text:style-name="L15">
        <text:list-item>
          <text:p text:style-name="P38"><text:bookmark text:name="p-rc_5e8fc662b4ae185f-94"/><text:span text:style-name="T2">Campos sobrantes:</text:span><text:span text:style-name="T1"> </text:span><text:span text:style-name="Source_20_Text"><text:span text:style-name="T1">BillingCity</text:span></text:span><text:span text:style-name="T1"> (Ciudad de Facturación), </text:span><text:span text:style-name="Source_20_Text"><text:span text:style-name="T1">BillingState</text:span></text:span><text:span text:style-name="T1"> (Estado de Facturación) y </text:span><text:span text:style-name="Source_20_Text"><text:span text:style-name="T1">BillingCountry</text:span></text:span><text:span text:style-name="T1"> (País de Facturación). </text:span></text:p>
        </text:list-item>
        <text:list-item>
          <text:p text:style-name="P38"><text:bookmark text:name="p-rc_5e8fc662b4ae185f-95"/><text:span text:style-name="T2">Razón:</text:span><text:span text:style-name="T1"> La </text:span><text:span text:style-name="T2">Pregunta 3</text:span><text:span text:style-name="T1"> pide evaluar el origen geográfico de los </text:span><text:span text:style-name="T4">clientes</text:span><text:span text:style-name="T1"> que incrementan sus compras año tras año. Esta información de procedencia se debe extraer de los atributos nativos de localización del cliente en la tabla </text:span><text:span text:style-name="Source_20_Text"><text:span text:style-name="T1">Customer</text:span></text:span><text:span text:style-name="T1"> (</text:span><text:span text:style-name="Source_20_Text"><text:span text:style-name="T1">City</text:span></text:span><text:span text:style-name="T1">, </text:span><text:span text:style-name="Source_20_Text"><text:span text:style-name="T1">State</text:span></text:span><text:span text:style-name="T1">, </text:span><text:span text:style-name="Source_20_Text"><text:span text:style-name="T1">Country</text:span></text:span><text:span text:style-name="T1">). Los campos de facturación (</text:span><text:span text:style-name="Source_20_Text"><text:span text:style-name="T1">Billing...</text:span></text:span><text:span text:style-name="T1">) de la tabla </text:span><text:span text:style-name="Source_20_Text"><text:span text:style-name="T1">Invoice</text:span></text:span><text:span text:style-name="T1"> registran el destino del cobro, el cual puede diferir de la residencia fiscal u origen del cliente, haciéndolos innecesarios para este requerimiento geográfico específico. </text:span></text:p>
        </text:list-item>
      </text:list>
      <text:h text:style-name="P26" text:outline-level="3">Resumen desde la Perspectiva de Inteligencia de Negocios (BI)</text:h>
      <text:p text:style-name="P9"><text:bookmark text:name="p-rc_5e8fc662b4ae185f-96"/><text:span text:style-name="T1">En el diseño de un proceso de carga de datos (ETL/ELT) hacia un Data Warehouse o un modelo analítico, identificar estos campos es clave. Los atributos como </text:span><text:span text:style-name="Source_20_Text"><text:span text:style-name="T1">Title</text:span></text:span><text:span text:style-name="T1"> (en Employee), </text:span><text:span text:style-name="Source_20_Text"><text:span text:style-name="T1">UnitPrice</text:span></text:span><text:span text:style-name="T1"> (en Track) y los datos de </text:span><text:span text:style-name="Source_20_Text"><text:span text:style-name="T1">Billing</text:span></text:span><text:span text:style-name="T1"> (en Invoice) representan </text:span><text:span text:style-name="T2">datos redundantes o ruido analítico</text:span><text:span text:style-name="T1"> para este pliego de preguntas específico. Podrían excluirse en la fase de transformación si se deseara optimizar al máximo el almacenamiento y la claridad del modelo final. </text:span></text:p>
      <text:p text:style-name="P52"/>
      <text:p text:style-name="P52"/>
      <text:h text:style-name="P27" text:outline-level="3">Ventajas de este Script Depurado:</text:h>
      <text:list text:style-name="L16">
        <text:list-item>
          <text:p text:style-name="P54"><text:span text:style-name="T5">Ahorro de almacenamiento y memoria:</text:span> Al remover campos extensos de texto como las direcciones de facturación y puestos, se reduce el tamaño físico de las páginas de datos en el disco y en el buffer pool de la memoria RAM.</text:p>
        </text:list-item>
        <text:list-item>
          <text:p text:style-name="P54"><text:span text:style-name="T5">Rendimiento en los </text:span><text:span text:style-name="Source_20_Text"><text:span text:style-name="T5">JOIN</text:span></text:span><text:span text:style-name="T5">:</text:span> Los índices creados al final ahora incluyen (<text:span text:style-name="Source_20_Text">INCLUDE</text:span>) las columnas métricas exactas (<text:span text:style-name="Source_20_Text">UnitPrice</text:span>, <text:span text:style-name="Source_20_Text">Quantity</text:span>, <text:span text:style-name="Source_20_Text">CustomerId</text:span>, <text:span text:style-name="Source_20_Text">Total</text:span>). Esto significa que las consultas analíticas complejas que involucren semestres o agrupaciones geográficas anuales se resolverán mediante un <text:span text:style-name="T5">Index Seek</text:span> de alta velocidad, evitando tocar la tabla base (<text:span text:style-name="T7">Key Lookup</text:span>).</text:p>
        </text:list-item>
      </text:list>
      <text:p text:style-name="P52"/>
      <text:p text:style-name="P52"/>
      <text:p text:style-name="P5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rgio Blanco</meta:initial-creator>
    <meta:creation-date>2026-05-24T18:28:24.347129429</meta:creation-date>
    <dc:date>2026-06-08T17:27:27.926899824</dc:date>
    <dc:creator>Sergio Blanco</dc:creator>
    <meta:editing-duration>PT13H51M8S</meta:editing-duration>
    <meta:editing-cycles>7</meta:editing-cycles>
    <meta:generator>LibreOffice/24.2.7.2$Linux_X86_64 LibreOffice_project/420$Build-2</meta:generator>
    <meta:document-statistic meta:table-count="1" meta:image-count="0" meta:object-count="0" meta:page-count="13" meta:paragraph-count="183" meta:word-count="2913" meta:character-count="19338" meta:non-whitespace-character-count="16671"/>
  </office:meta>
</office:document-meta>
</file>